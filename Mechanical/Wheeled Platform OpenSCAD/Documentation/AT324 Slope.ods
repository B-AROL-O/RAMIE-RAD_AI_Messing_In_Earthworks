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166cm"/>
    </style:style>
    <style:style style:name="co4" style:family="table-column">
      <style:table-column-properties fo:break-before="auto" style:column-width="4.473cm"/>
    </style:style>
    <style:style style:name="co5" style:family="table-column">
      <style:table-column-properties fo:break-before="auto" style:column-width="2.96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 table:print="false">
        <table:shapes>
          <draw:frame draw:z-index="0" draw:style-name="gr1" draw:text-style-name="P1" svg:width="11.051cm" svg:height="8.993cm" svg:x="22.864cm" svg:y="2.578cm">
            <draw:object draw:notify-on-update-of-ranges="Sheet1.F11:Sheet1.F25 Sheet1.G11:Sheet1.G2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4" table:default-cell-style-name="Default"/>
        <table:table-row table:style-name="ro1">
          <table:table-cell table:number-columns-repeated="4"/>
          <table:table-cell office:value-type="string" calcext:value-type="string">
            <text:p>UPPER HOLE</text:p>
          </table:table-cell>
          <table:table-cell office:value-type="float" office:value="10" calcext:value-type="float">
            <text:p>10.000</text:p>
          </table:table-cell>
          <table:table-cell office:value-type="string" calcext:value-type="string">
            <text:p>distance of hole from start of slop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LOWER HOLE</text:p>
          </table:table-cell>
          <table:table-cell office:value-type="float" office:value="30" calcext:value-type="float">
            <text:p>30.000</text:p>
          </table:table-cell>
          <table:table-cell table:number-columns-repeated="3"/>
        </table:table-row>
        <table:table-row table:style-name="ro2">
          <table:table-cell table:number-columns-repeated="5"/>
          <table:table-cell office:value-type="string" calcext:value-type="string">
            <text:p>DEGREE</text:p>
          </table:table-cell>
          <table:table-cell office:value-type="string" calcext:value-type="string">
            <text:p>RADIANS</text:p>
          </table:table-cell>
          <table:table-cell office:value-type="string" calcext:value-type="string">
            <text:p>COS</text:p>
          </table:table-cell>
          <table:table-cell office:value-type="string" calcext:value-type="string">
            <text:p>SIN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ANGLE</text:p>
          </table:table-cell>
          <table:table-cell office:value-type="float" office:value="60" calcext:value-type="float">
            <text:p>60.000</text:p>
          </table:table-cell>
          <table:table-cell table:formula="of:=[.F4]/360*2*PI()" office:value-type="float" office:value="1.0471975511966" calcext:value-type="float">
            <text:p>1.047</text:p>
          </table:table-cell>
          <table:table-cell table:formula="of:=COS([.G4])" office:value-type="float" office:value="0.5" calcext:value-type="float">
            <text:p>0.500</text:p>
          </table:table-cell>
          <table:table-cell table:formula="of:=SIN([.G4])" office:value-type="float" office:value="0.866025403784439" calcext:value-type="float">
            <text:p>0.866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L</text:p>
          </table:table-cell>
          <table:table-cell office:value-type="float" office:value="50" calcext:value-type="float">
            <text:p>50.000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H</text:p>
          </table:table-cell>
          <table:table-cell office:value-type="float" office:value="70" calcext:value-type="float">
            <text:p>70.000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H_VERTICAL</text:p>
          </table:table-cell>
          <table:table-cell office:value-type="float" office:value="50" calcext:value-type="float">
            <text:p>50.000</text:p>
          </table:table-cell>
          <table:table-cell office:value-type="string" calcext:value-type="string">
            <text:p>how long it goes up vertically before sloping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 calcext:value-type="string">
            <text:p>TAN(ANGLE)</text:p>
          </table:table-cell>
          <table:table-cell table:formula="of:=TAN([.F4]/360*2*PI())" office:value-type="float" office:value="1.73205080756888" calcext:value-type="float">
            <text:p>1.732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H_SLOPE</text:p>
          </table:table-cell>
          <table:table-cell table:formula="of:=[.F6]-[.F7]" office:value-type="float" office:value="20" calcext:value-type="float">
            <text:p>20.000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H_SLOPE*TAN(ANGLE)</text:p>
          </table:table-cell>
          <table:table-cell office:value-type="string" calcext:value-type="string">
            <text:p>L_SLOPE</text:p>
          </table:table-cell>
          <table:table-cell table:formula="of:=[.F9]*[.F8]" office:value-type="float" office:value="34.6410161513775" calcext:value-type="float">
            <text:p>34.641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L_HORIZONTAL</text:p>
          </table:table-cell>
          <table:table-cell table:formula="of:=[.F5]-[.F10]" office:value-type="float" office:value="15.3589838486225" calcext:value-type="float">
            <text:p>15.359</text:p>
          </table:table-cell>
          <table:table-cell table:number-columns-repeated="3"/>
        </table:table-row>
        <table:table-row table:style-name="ro2" table:number-rows-repeated="2">
          <table:table-cell table:number-columns-repeated="9"/>
        </table:table-row>
        <table:table-row table:style-name="ro2">
          <table:table-cell table:number-columns-repeated="5"/>
          <table:table-cell office:value-type="string" calcext:value-type="string">
            <text:p>X (L)</text:p>
          </table:table-cell>
          <table:table-cell office:value-type="string" calcext:value-type="string">
            <text:p>Y (H)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 calcext:value-type="string">
            <text:p>Down left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down right</text:p>
          </table:table-cell>
          <table:table-cell table:formula="of:=[.$F$5]" office:value-type="float" office:value="50" calcext:value-type="float">
            <text:p>50.000</text:p>
          </table:table-cell>
          <table:table-cell office:value-type="float" office:value="0" calcext:value-type="float">
            <text:p>0.000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up right</text:p>
          </table:table-cell>
          <table:table-cell table:formula="of:=[.$F$5]" office:value-type="float" office:value="50" calcext:value-type="float">
            <text:p>50.000</text:p>
          </table:table-cell>
          <table:table-cell table:formula="of:=[.$F$6]" office:value-type="float" office:value="70" calcext:value-type="float">
            <text:p>70.000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L_horizontal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up left</text:p>
          </table:table-cell>
          <table:table-cell table:formula="of:=[.$F$10]" office:value-type="float" office:value="34.6410161513775" calcext:value-type="float">
            <text:p>34.641</text:p>
          </table:table-cell>
          <table:table-cell table:formula="of:=[.$F$6]" office:value-type="float" office:value="70" calcext:value-type="float">
            <text:p>70.000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L_horizontal-Dhole*sin(A)</text:p>
          </table:table-cell>
          <table:table-cell office:value-type="string" calcext:value-type="string">
            <text:p>H-Dhole*cos(A)</text:p>
          </table:table-cell>
          <table:table-cell office:value-type="string" calcext:value-type="string">
            <text:p>Upper hole</text:p>
          </table:table-cell>
          <table:table-cell table:formula="of:=[.F18]-[.F1]*SIN([.G4])" office:value-type="float" office:value="25.9807621135332" calcext:value-type="float">
            <text:p>25.981</text:p>
          </table:table-cell>
          <table:table-cell table:formula="of:=[.G18]-[.F1]*COS([.G4])" office:value-type="float" office:value="65" calcext:value-type="float">
            <text:p>65.000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L_horizontal / 2</text:p>
          </table:table-cell>
          <table:table-cell office:value-type="string" calcext:value-type="string">
            <text:p>H_vertical+H_slope/2</text:p>
          </table:table-cell>
          <table:table-cell office:value-type="string" calcext:value-type="string">
            <text:p>slope midpoint</text:p>
          </table:table-cell>
          <table:table-cell table:formula="of:=[.F10]/2" office:value-type="float" office:value="17.3205080756888" calcext:value-type="float">
            <text:p>17.321</text:p>
          </table:table-cell>
          <table:table-cell table:formula="of:=[.F7]+[.F9]/2" office:value-type="float" office:value="60" calcext:value-type="float">
            <text:p>60.000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L_horizontal-Dhole*sin(A)</text:p>
          </table:table-cell>
          <table:table-cell office:value-type="string" calcext:value-type="string">
            <text:p>L_horizontal-Dhole*cos(A)</text:p>
          </table:table-cell>
          <table:table-cell office:value-type="string" calcext:value-type="string">
            <text:p>Lower hole</text:p>
          </table:table-cell>
          <table:table-cell table:formula="of:=[.F18]-[.F2]*SIN([.G4])" office:value-type="float" office:value="8.66025403784438" calcext:value-type="float">
            <text:p>8.660</text:p>
          </table:table-cell>
          <table:table-cell table:formula="of:=[.G18]-[.F2]*COS([.G4])" office:value-type="float" office:value="55" calcext:value-type="float">
            <text:p>55.000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 calcext:value-type="string">
            <text:p>vertical down</text:p>
          </table:table-cell>
          <table:table-cell office:value-type="float" office:value="0" calcext:value-type="float">
            <text:p>0.000</text:p>
          </table:table-cell>
          <table:table-cell table:formula="of:=[.$F$7]" office:value-type="float" office:value="50" calcext:value-type="float">
            <text:p>50.000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 calcext:value-type="string">
            <text:p>CLOSE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2"/>
        </table:table-row>
        <table:table-row table:style-name="ro2">
          <table:table-cell table:number-columns-repeated="9"/>
        </table:table-row>
        <table:table-row table:style-name="ro2">
          <table:table-cell table:number-columns-repeated="2"/>
          <table:table-cell office:value-type="string" calcext:value-type="string">
            <text:p>slope length</text:p>
          </table:table-cell>
          <table:table-cell table:formula="of:=SQRT( [.F9]^2 + [.F10]^2)" office:value-type="float" office:value="40" calcext:value-type="float">
            <text:p>40.000</text:p>
          </table:table-cell>
          <table:table-cell table:number-columns-repeated="5"/>
        </table:table-row>
        <table:table-row table:style-name="ro2" table:number-rows-repeated="4">
          <table:table-cell table:number-columns-repeated="9"/>
        </table:table-row>
        <table:table-row table:style-name="ro2">
          <table:table-cell table:number-columns-repeated="2"/>
          <table:table-cell office:value-type="string" calcext:value-type="string">
            <text:p>i'm trying to find the exact coordinate where to drill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so the distance from the start of the slope is the anchor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it's a circle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so i use cos and sin with the angle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GB" style:font-name-asian="Arial Unicode MS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currency-style style:name="N120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20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20P0"/>
    </number:currency-style>
    <number:number-style style:name="N121">
      <number:number number:decimal-places="3" number:min-decimal-places="3" number:min-integer-digits="1"/>
    </number:number-style>
    <number:number-style style:name="N122">
      <number:scientific-number number:decimal-places="3" number:min-decimal-places="3" number:min-integer-digits="1" number:min-exponent-digits="1" number:exponent-interval="1" number:forced-exponent-sign="true"/>
    </number:number-style>
    <number:date-style style:name="N123">
      <number:year number:style="long"/>
      <number:text>-</number:text>
      <number:month/>
      <number:text>-</number:text>
      <number:day number:style="long"/>
    </number:date-style>
    <number:number-style style:name="N124">
      <number:number number:decimal-places="1" number:min-decimal-places="1" number:min-integer-digits="1"/>
    </number:number-style>
    <number:number-style style:name="N125">
      <number:number number:decimal-places="4" number:min-decimal-places="4" number:min-integer-digits="1"/>
    </number:number-style>
    <style:style style:name="Default" style:family="table-cell" style:data-style-name="N121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0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7">00/00/0000</text:date>, <text:time style:data-style-name="N2" text:time-value="17:27:03.70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02-11T16:56:51.99</meta:creation-date>
    <meta:generator>LibreOffice/24.2.0.3$Windows_X86_64 LibreOffice_project/da48488a73ddd66ea24cf16bbc4f7b9c08e9bea1</meta:generator>
    <dc:date>2025-11-17T18:35:14.601000000</dc:date>
    <meta:editing-duration>PT11H30M42S</meta:editing-duration>
    <meta:editing-cycles>197</meta:editing-cycles>
    <meta:document-statistic meta:table-count="1" meta:cell-count="76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21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121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1.052cm" svg:height="8.994cm" xlink:href=".." xlink:type="simple" chart:class="chart:scatter" chart:style-name="ch1">
        <chart:plot-area chart:style-name="ch2" table:cell-range-address="Sheet1.F11:Sheet1.G25" svg:x="0.221cm" svg:y="0.179cm" svg:width="10.61cm" svg:height="8.636cm">
          <chart:coordinate-region svg:x="1.557cm" svg:y="0.378cm" svg:width="8.73cm" svg:height="7.79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G11:Sheet1.G25" chart:class="chart:scatter">
            <chart:domain table:cell-range-address="Sheet1.F11:Sheet1.F25"/>
            <chart:data-point chart:repeated="1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.3589838486225">
                <text:p>15.3589838486225</text:p>
                <draw:g>
                  <svg:desc>Sheet1.F11:Sheet1.F25</svg:desc>
                </draw:g>
              </table:table-cell>
              <table:table-cell office:value-type="float" office:value="NaN">
                <text:p>NaN</text:p>
                <draw:g>
                  <svg:desc>Sheet1.G11:Sheet1.G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">
                <text:p>5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4.6410161513775">
                <text:p>34.641016151377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.9807621135332">
                <text:p>25.980762113533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.3205080756888">
                <text:p>17.320508075688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.66025403784438">
                <text:p>8.6602540378443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0.3$Windows_X86_64 LibreOffice_project/da48488a73ddd66ea24cf16bbc4f7b9c08e9bea1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